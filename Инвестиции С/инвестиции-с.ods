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office:value-type="string" calcext:value-type="string">
            <text:p>1</text:p>
          </table:table-cell>
          <table:table-cell table:style-name="ce9" table:number-columns-repeated="4"/>
          <table:table-cell table:style-name="ce9" office:value-type="string" calcext:value-type="string">
            <text:p>2026.06.29 15.58</text:p>
          </table:table-cell>
          <table:table-cell table:style-name="ce9"/>
          <table:table-cell table:style-name="ce9" office:value-type="string" calcext:value-type="string">
            <text:p>13.49</text:p>
          </table:table-cell>
          <table:table-cell table:style-name="ce9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table:number-columns-repeated="5"/>
          <table:table-cell table:style-name="ce9" office:value-type="string" calcext:value-type="string">
            <text:p>2026.06.24 12.28</text:p>
          </table:table-cell>
          <table:table-cell table:style-name="ce9"/>
          <table:table-cell table:style-name="ce9" office:value-type="string" calcext:value-type="string">
            <text:p>231.2</text:p>
          </table:table-cell>
          <table:table-cell table:style-name="ce9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7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07.73</text:p>
          </table:table-cell>
          <table:table-cell office:value-type="string" calcext:value-type="string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0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203.88</text:p>
          </table:table-cell>
          <table:table-cell office:value-type="string" calcext:value-type="string">
            <text:p>3.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/>
          <table:table-cell office:value-type="string" calcext:value-type="string">
            <text:p>20833.71</text:p>
          </table:table-cell>
          <table:table-cell office:value-type="string" calcext:value-type="string">
            <text:p>14.41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20819.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 office:value-type="string" calcext:value-type="string">
            <text:p>1046.939090909091</text:p>
          </table:table-cell>
          <table:table-cell table:number-columns-repeated="2"/>
          <table:table-cell office:value-type="string" calcext:value-type="string">
            <text:p>57581.65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9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7" office:value-type="string" calcext:value-type="string">
            <text:p>SBGD (Доступное золото Фонд УК Первая)</text:p>
          </table:table-cell>
          <table:table-cell table:style-name="ce18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9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9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9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4.18</text:p>
          </table:table-cell>
          <table:table-cell table:style-name="ce9" office:value-type="string" calcext:value-type="string">
            <text:p>25</text:p>
          </table:table-cell>
          <table:table-cell table:style-name="ce9"/>
          <table:table-cell table:style-name="ce9" office:value-type="string" calcext:value-type="string">
            <text:p>397.43</text:p>
          </table:table-cell>
          <table:table-cell table:style-name="ce9" office:value-type="string" calcext:value-type="string">
            <text:p>0</text:p>
          </table:table-cell>
          <table:table-cell table:style-name="ce9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9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9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9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9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.00.0000</text:date>, <text:time style:data-style-name="N2" text:time-value="11:36:25.7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08T11:44:41.435000000</dc:date>
    <meta:editing-duration>P3DT56M12S</meta:editing-duration>
    <meta:editing-cycles>1254</meta:editing-cycles>
    <meta:document-statistic meta:table-count="2" meta:cell-count="2673" meta:object-count="0"/>
  </office:meta>
</office:document-meta>
</file>