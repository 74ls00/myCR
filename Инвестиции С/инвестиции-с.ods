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2026.06.29 15.58</text:p>
          </table:table-cell>
          <table:table-cell table:style-name="ce12"/>
          <table:table-cell table:style-name="ce12" office:value-type="string" calcext:value-type="string">
            <text:p>13.49</text:p>
          </table:table-cell>
          <table:table-cell table:style-name="ce12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03:42:43.9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7T03:44:47.369000000</dc:date>
    <meta:editing-duration>P3DT46M23S</meta:editing-duration>
    <meta:editing-cycles>1249</meta:editing-cycles>
    <meta:document-statistic meta:table-count="2" meta:cell-count="2638" meta:object-count="0"/>
  </office:meta>
</office:document-meta>
</file>