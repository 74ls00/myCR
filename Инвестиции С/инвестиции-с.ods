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  <table:table-cell table:number-columns-repeated="15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Default" table:number-columns-repeated="17"/>
          <table:table-cell table:number-columns-repeated="1007"/>
          <table:table-cell table:style-name="ce5"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637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6374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6372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6372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6378"/>
        </table:table-row>
        <table:table-row table:style-name="ro1" table:number-rows-repeated="10483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.00.0000</text:date>, <text:time style:data-style-name="N2" text:time-value="02:54:14.9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25T02:59:52.770000000</dc:date>
    <meta:editing-duration>P2DT23H9M53S</meta:editing-duration>
    <meta:editing-cycles>1216</meta:editing-cycles>
    <meta:document-statistic meta:table-count="2" meta:cell-count="2358" meta:object-count="0"/>
  </office:meta>
</office:document-meta>
</file>