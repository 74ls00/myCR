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4"/>
          <table:table-cell table:style-name="ce12" office:value-type="string" calcext:value-type="string">
            <text:p>2026.06.29 15.58</text:p>
          </table:table-cell>
          <table:table-cell table:style-name="ce12"/>
          <table:table-cell table:style-name="ce12" office:value-type="string" calcext:value-type="string">
            <text:p>13.49</text:p>
          </table:table-cell>
          <table:table-cell table:style-name="ce12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12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25</text:p>
          </table:table-cell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12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20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.00.0000</text:date>, <text:time style:data-style-name="N2" text:time-value="02:38:19.90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01T03:00:11.753000000</dc:date>
    <meta:editing-duration>P3DT21M41S</meta:editing-duration>
    <meta:editing-cycles>1237</meta:editing-cycles>
    <meta:document-statistic meta:table-count="2" meta:cell-count="2552" meta:object-count="0"/>
  </office:meta>
</office:document-meta>
</file>