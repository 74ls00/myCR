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4"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4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4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table:style-name="Default" office:value-type="string" calcext:value-type="string">
            <text:p>93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5"/>
        </table:table-row>
        <table:table-row table:style-name="ro1" table:number-rows-repeated="104841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office:forms form:automatic-focus="false" form:apply-design-mode="false"/>
        <table:table-column table:style-name="co19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4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5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.00.0000</text:date>, <text:time style:data-style-name="N2" text:time-value="22:12:32.99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6-08T22:22:13.263000000</dc:date>
    <meta:editing-duration>P2DT21H22M57S</meta:editing-duration>
    <meta:editing-cycles>1171</meta:editing-cycles>
    <meta:document-statistic meta:table-count="2" meta:cell-count="1962" meta:object-count="0"/>
  </office:meta>
</office:document-meta>
</file>