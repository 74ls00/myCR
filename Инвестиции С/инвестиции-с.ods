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 table:number-rows-repeated="104845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.00.0000</text:date>, <text:time style:data-style-name="N2" text:time-value="20:00:49.3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5-27T20:06:01.321000000</dc:date>
    <meta:editing-duration>P2DT20H52M41S</meta:editing-duration>
    <meta:editing-cycles>1158</meta:editing-cycles>
    <meta:document-statistic meta:table-count="2" meta:cell-count="1823" meta:object-count="0"/>
  </office:meta>
</office:document-meta>
</file>