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  <table:table-cell table:number-columns-repeated="15360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  <table:table-cell table:style-name="ce5" table:number-columns-repeated="15360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  <table:table-cell table:style-name="ce5" table:number-columns-repeated="1536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  <table:table-cell table:style-name="ce5" table:number-columns-repeated="15360"/>
        </table:table-row>
        <table:table-row table:style-name="ro1" table:number-rows-repeated="6">
          <table:table-cell table:number-columns-repeated="1024"/>
          <table:table-cell table:style-name="ce5"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637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034.01</text:p>
          </table:table-cell>
          <table:table-cell table:number-columns-repeated="1637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52.0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068.0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068.0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068.0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034.01</text:p>
          </table:table-cell>
          <table:table-cell table:number-columns-repeated="5"/>
          <table:table-cell office:value-type="string" calcext:value-type="string">
            <text:p>9024.1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360=</text:p>
          </table:table-cell>
          <table:table-cell office:value-type="string" calcext:value-type="string">
            <text:p>16.51680508474576</text:p>
          </table:table-cell>
          <table:table-cell table:number-columns-repeated="2"/>
          <table:table-cell office:value-type="string" calcext:value-type="string">
            <text:p>38979.66</text:p>
          </table:table-cell>
          <table:table-cell table:number-columns-repeated="16378"/>
        </table:table-row>
        <table:table-row table:style-name="ro1" table:number-rows-repeated="10483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.00.0000</text:date>, <text:time style:data-style-name="N2" text:time-value="05:52:04.8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6T06:07:54.124000000</dc:date>
    <meta:editing-duration>P2DT23H25M40S</meta:editing-duration>
    <meta:editing-cycles>1220</meta:editing-cycles>
    <meta:document-statistic meta:table-count="2" meta:cell-count="2434" meta:object-count="0"/>
  </office:meta>
</office:document-meta>
</file>