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13" style:family="table-cell" style:parent-style-name="Default" style:data-style-name="N100">
      <style:table-cell-properties fo:background-color="#96d9b7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3" office:value-type="string" calcext:value-type="string">
            <text:p>469.47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table:style-name="Default" office:value-type="string" calcext:value-type="string">
            <text:p>93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1"/>
        </table:table-row>
        <table:table-row table:style-name="ro1" table:number-rows-repeated="104839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.00.0000</text:date>, <text:time style:data-style-name="N2" text:time-value="00:30:37.36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17T00:40:03.865000000</dc:date>
    <meta:editing-duration>P2DT21H57M53S</meta:editing-duration>
    <meta:editing-cycles>1183</meta:editing-cycles>
    <meta:document-statistic meta:table-count="2" meta:cell-count="2072" meta:object-count="0"/>
  </office:meta>
</office:document-meta>
</file>