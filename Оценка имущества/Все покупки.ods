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 table:style-name="Default"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6"/>
          <table:table-cell table:style-name="Default"/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table:style-name="Default" table:number-columns-repeated="6"/>
          <table:table-cell office:value-type="string" calcext:value-type="string">
            <text:p>11653+3124.08=14777.08</text:p>
          </table:table-cell>
          <table:table-cell table:style-name="Default" table:number-columns-repeated="1018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312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1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.00.0000</text:date>, <text:time style:data-style-name="N2" text:time-value="07:45:45.8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01T07:45:58.682000000</dc:date>
    <meta:editing-duration>P10DT12H10M34S</meta:editing-duration>
    <meta:editing-cycles>4157</meta:editing-cycles>
    <meta:document-statistic meta:table-count="1" meta:cell-count="765" meta:object-count="0"/>
    <meta:user-defined meta:name="qrichtext">1</meta:user-defined>
  </office:meta>
</office:document-meta>
</file>