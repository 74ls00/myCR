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124.08=14777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309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.00.0000</text:date>, <text:time style:data-style-name="N2" text:time-value="23:45:23.3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05T23:47:41.245000000</dc:date>
    <meta:editing-duration>P10DT12H12M51S</meta:editing-duration>
    <meta:editing-cycles>4159</meta:editing-cycles>
    <meta:document-statistic meta:table-count="1" meta:cell-count="771" meta:object-count="0"/>
    <meta:user-defined meta:name="qrichtext">1</meta:user-defined>
  </office:meta>
</office:document-meta>
</file>