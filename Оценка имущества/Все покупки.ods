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Открывалка банок сталь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189</text:p>
          </table:table-cell>
          <table:table-cell table:number-columns-repeated="1020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8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Мановакууметр, диаметр: 68мм R600a для низкого давления DSZH WK-6811L</text:p>
          </table:table-cell>
          <table:table-cell table:number-columns-repeated="2"/>
          <table:table-cell office:value-type="string" calcext:value-type="string">
            <text:p>610-76=534</text:p>
          </table:table-cell>
          <table:table-cell table:number-columns-repeated="1020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 table:number-columns-repeated="6"/>
          <table:table-cell office:value-type="string" calcext:value-type="string">
            <text:p>11653+4264.08=15917.0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22</text:p>
          </table:table-cell>
          <table:table-cell office:value-type="string" calcext:value-type="string">
            <text:p>Фреон R600a с клапаном Шредера , 420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6.06.24</text:p>
          </table:table-cell>
          <table:table-cell office:value-type="string" calcext:value-type="string">
            <text:p>763</text:p>
          </table:table-cell>
          <table:table-cell/>
          <table:table-cell office:value-type="string" calcext:value-type="string">
            <text:p>7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30г 6.2x2.5x2.5 (24x0.4x140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18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15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50г 6.2x2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224</text:p>
          </table:table-cell>
          <table:table-cell/>
          <table:table-cell office:value-type="string" calcext:value-type="string">
            <text:p>22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4264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/>
          <table:table-cell office:value-type="string" calcext:value-type="string">
            <text:p>Капиллярная трубка медная 0,67 мм, 15м</text:p>
          </table:table-cell>
          <table:table-cell table:number-columns-repeated="2"/>
          <table:table-cell office:value-type="string" calcext:value-type="string">
            <text:p>921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wildberries.ru/catalog/216168559/detail.aspx?size=344639566</text:p>
          </table:table-cell>
          <table:table-cell table:number-columns-repeated="2"/>
          <table:table-cell office:value-type="string" calcext:value-type="string">
            <text:p>863</text:p>
          </table:table-cell>
          <table:table-cell table:number-columns-repeated="2"/>
          <table:table-cell office:value-type="string" calcext:value-type="string">
            <text:p>57.53333333333333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ozon.ru/product/kapillyarnaya-trubka-kapilyarka-mednaya-0-67-mm-dlya-holodilnika-r600a-r600-2469934067/?at=qQtJ3yyZLcWQN99GTw2AyPEUYlWgvGU7xpYQlUPBg9g7</text:p>
          </table:table-cell>
          <table:table-cell table:number-columns-repeated="2"/>
          <table:table-cell office:value-type="string" calcext:value-type="string">
            <text:p>996</text:p>
          </table:table-cell>
          <table:table-cell table:number-columns-repeated="2"/>
          <table:table-cell office:value-type="string" calcext:value-type="string">
            <text:p>66.4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4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1048295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8">00.00.0000</text:date>, <text:time style:data-style-name="N2" text:time-value="05:44:30.00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6-28T05:51:07.459000000</dc:date>
    <meta:editing-duration>P10DT13H49M51S</meta:editing-duration>
    <meta:editing-cycles>4184</meta:editing-cycles>
    <meta:document-statistic meta:table-count="1" meta:cell-count="803" meta:object-count="0"/>
    <meta:user-defined meta:name="qrichtext">1</meta:user-defined>
  </office:meta>
</office:document-meta>
</file>