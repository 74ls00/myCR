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77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Подушка Verossa 170920/158933 70х70 см Верблюжья шерсть чехол хлопо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15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457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?</text:p>
          </table:table-cell>
          <table:table-cell table:style-name="ce10" office:value-type="string" calcext:value-type="string">
            <text:p>Набор надфилей VOREL 25351 140мм-6шт.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0-170?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Съемник подшипников (набор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9</text:p>
          </table:table-cell>
          <table:table-cell office:value-type="string" calcext:value-type="string">
            <text:p>770</text:p>
          </table:table-cell>
          <table:table-cell table:number-columns-repeated="1020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0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0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0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0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0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0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0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9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0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0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0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0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0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0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онтроллер 55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6</text:p>
          </table:table-cell>
          <table:table-cell office:value-type="string" calcext:value-type="string">
            <text:p>46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Контроллер</text:p>
          </table:table-cell>
          <table:table-cell table:number-columns-repeated="2"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Ротор</text:p>
          </table:table-cell>
          <table:table-cell table:number-columns-repeated="2"/>
          <table:table-cell office:value-type="string" calcext:value-type="string">
            <text:p>30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магнит</text:p>
          </table:table-cell>
          <table:table-cell table:number-columns-repeated="2"/>
          <table:table-cell office:value-type="string" calcext:value-type="string">
            <text:p>296.7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table:number-columns-repeated="5"/>
          <table:table-cell office:value-type="string" calcext:value-type="string">
            <text:p>=1292.74</text:p>
          </table:table-cell>
          <table:table-cell table:number-columns-repeated="10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0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0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0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10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0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0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творители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Уайт-спирит ТУ <text:s/>НХП 10л. бутылка. GW6.44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9</text:p>
          </table:table-cell>
          <table:table-cell office:value-type="string" calcext:value-type="string">
            <text:p>1270.95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207.95</text:p>
          </table:table-cell>
          <table:table-cell table:number-columns-repeated="1018"/>
        </table:table-row>
        <table:table-row table:style-name="ro2" table:number-rows-repeated="104827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.00.0000</text:date>, <text:time style:data-style-name="N2" text:time-value="02:50:48.1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7-18T02:51:40.226000000</dc:date>
    <meta:editing-duration>P10DT14H55M43S</meta:editing-duration>
    <meta:editing-cycles>4198</meta:editing-cycles>
    <meta:document-statistic meta:table-count="1" meta:cell-count="837" meta:object-count="0"/>
    <meta:user-defined meta:name="qrichtext">1</meta:user-defined>
  </office:meta>
</office:document-meta>
</file>