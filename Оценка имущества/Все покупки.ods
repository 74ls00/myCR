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?</text:p>
          </table:table-cell>
          <table:table-cell table:style-name="ce10" office:value-type="string" calcext:value-type="string">
            <text:p>Набор надфилей VOREL 25351 140мм-6шт.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0-170?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0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0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0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0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0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0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0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9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0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0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0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0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0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0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онтроллер 55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6</text:p>
          </table:table-cell>
          <table:table-cell office:value-type="string" calcext:value-type="string">
            <text:p>46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Контроллер</text:p>
          </table:table-cell>
          <table:table-cell table:number-columns-repeated="2"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Ротор</text:p>
          </table:table-cell>
          <table:table-cell table:number-columns-repeated="2"/>
          <table:table-cell office:value-type="string" calcext:value-type="string">
            <text:p>306</text:p>
          </table:table-cell>
          <table:table-cell table:number-columns-repeated="11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0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0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0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0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0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0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8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.00.0000</text:date>, <text:time style:data-style-name="N2" text:time-value="21:23:49.2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7-06T21:31:07.599000000</dc:date>
    <meta:editing-duration>P10DT14H50M58S</meta:editing-duration>
    <meta:editing-cycles>4193</meta:editing-cycles>
    <meta:document-statistic meta:table-count="1" meta:cell-count="824" meta:object-count="0"/>
    <meta:user-defined meta:name="qrichtext">1</meta:user-defined>
  </office:meta>
</office:document-meta>
</file>