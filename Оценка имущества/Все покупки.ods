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wildberries.ru/catalog/216168559/detail.aspx?size=344639566</text:p>
          </table:table-cell>
          <table:table-cell table:number-columns-repeated="2"/>
          <table:table-cell office:value-type="string" calcext:value-type="string">
            <text:p>863</text:p>
          </table:table-cell>
          <table:table-cell table:number-columns-repeated="2"/>
          <table:table-cell office:value-type="string" calcext:value-type="string">
            <text:p>57.53333333333333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ozon.ru/product/kapillyarnaya-trubka-kapilyarka-mednaya-0-67-mm-dlya-holodilnika-r600a-r600-2469934067/?at=qQtJ3yyZLcWQN99GTw2AyPEUYlWgvGU7xpYQlUPBg9g7</text:p>
          </table:table-cell>
          <table:table-cell table:number-columns-repeated="2"/>
          <table:table-cell office:value-type="string" calcext:value-type="string">
            <text:p>996</text:p>
          </table:table-cell>
          <table:table-cell table:number-columns-repeated="2"/>
          <table:table-cell office:value-type="string" calcext:value-type="string">
            <text:p>66.4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творители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Уайт-спирит ТУ <text:s/>НХП 10л. бутылка. GW6.44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9</text:p>
          </table:table-cell>
          <table:table-cell office:value-type="string" calcext:value-type="string">
            <text:p>1270.95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207.95</text:p>
          </table:table-cell>
          <table:table-cell table:number-columns-repeated="1018"/>
        </table:table-row>
        <table:table-row table:style-name="ro2" table:number-rows-repeated="104829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.00.0000</text:date>, <text:time style:data-style-name="N2" text:time-value="18:53:40.0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29T19:40:46.752000000</dc:date>
    <meta:editing-duration>P10DT14H42M34S</meta:editing-duration>
    <meta:editing-cycles>4189</meta:editing-cycles>
    <meta:document-statistic meta:table-count="1" meta:cell-count="810" meta:object-count="0"/>
    <meta:user-defined meta:name="qrichtext">1</meta:user-defined>
  </office:meta>
</office:document-meta>
</file>