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Открывалка банок сталь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189</text:p>
          </table:table-cell>
          <table:table-cell table:number-columns-repeated="1020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8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Пережимка труб</text:p>
          </table:table-cell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Мановакууметр, диаметр: 68мм R600a для низкого давления DSZH WK-6811L</text:p>
          </table:table-cell>
          <table:table-cell table:number-columns-repeated="2"/>
          <table:table-cell office:value-type="string" calcext:value-type="string">
            <text:p>610-76=534</text:p>
          </table:table-cell>
          <table:table-cell table:number-columns-repeated="1020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 table:number-columns-repeated="6"/>
          <table:table-cell office:value-type="string" calcext:value-type="string">
            <text:p>11653+3501.08=15154.0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22</text:p>
          </table:table-cell>
          <table:table-cell office:value-type="string" calcext:value-type="string">
            <text:p>Фреон R600a с клапаном Шредера , 420г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63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30г 6.2x2.5x2.5 (24x0.4x140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18</text:p>
          </table:table-cell>
          <table:table-cell office:value-type="string" calcext:value-type="string">
            <text:p>153</text:p>
          </table:table-cell>
          <table:table-cell/>
          <table:table-cell office:value-type="string" calcext:value-type="string">
            <text:p>15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50г 6.2x2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224</text:p>
          </table:table-cell>
          <table:table-cell/>
          <table:table-cell office:value-type="string" calcext:value-type="string">
            <text:p>22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3501.0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office:value-type="string" calcext:value-type="string">
            <text:p>15154.08+763=15917.08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6.05)</text:p>
          </table:table-cell>
          <table:table-cell office:value-type="string" calcext:value-type="string">
            <text:p>Переходник для заправки газовых баллончиков + адапте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</text:p>
          </table:table-cell>
          <table:table-cell table:number-columns-repeated="3"/>
          <table:table-cell office:value-type="string" calcext:value-type="string">
            <text:p>4.092</text:p>
          </table:table-cell>
          <table:table-cell table:number-columns-repeated="2"/>
          <table:table-cell office:value-type="string" calcext:value-type="string">
            <text:p>74.2956</text:p>
          </table:table-cell>
          <table:table-cell table:number-columns-repeated="1013"/>
        </table:table-row>
        <table:table-row table:style-name="ro2" table:number-rows-repeated="1048298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.00.0000</text:date>, <text:time style:data-style-name="N2" text:time-value="05:37:59.11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6-22T05:40:42.653000000</dc:date>
    <meta:editing-duration>P10DT12H25M58S</meta:editing-duration>
    <meta:editing-cycles>4176</meta:editing-cycles>
    <meta:document-statistic meta:table-count="1" meta:cell-count="794" meta:object-count="0"/>
    <meta:user-defined meta:name="qrichtext">1</meta:user-defined>
  </office:meta>
</office:document-meta>
</file>