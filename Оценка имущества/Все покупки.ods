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1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1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0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1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1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 table:number-columns-repeated="3"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table:style-name="Default"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 table:number-columns-repeated="3"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style-name="Default"/>
          <table:table-cell table:number-columns-repeated="1017"/>
        </table:table-row>
        <table:table-row table:style-name="ro2" table:number-rows-repeated="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style-name="Default" table:number-columns-repeated="1025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style-name="Default"/>
          <table:table-cell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 table:style-name="Default"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22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4">00.00.0000</text:date>, <text:time style:data-style-name="N2" text:time-value="00:36:25.42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5-24T00:36:54.017000000</dc:date>
    <meta:editing-duration>P10DT8H54M21S</meta:editing-duration>
    <meta:editing-cycles>4134</meta:editing-cycles>
    <meta:document-statistic meta:table-count="1" meta:cell-count="748" meta:object-count="0"/>
    <meta:user-defined meta:name="qrichtext">1</meta:user-defined>
  </office:meta>
</office:document-meta>
</file>