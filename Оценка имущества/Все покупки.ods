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77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Подушка Verossa 170920/158933 70х70 см Верблюжья шерсть чехол хлопо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5</text:p>
          </table:table-cell>
          <table:table-cell office:value-type="string" calcext:value-type="string">
            <text:p>1533</text:p>
          </table:table-cell>
          <table:table-cell table:number-columns-repeated="1020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Съемник подшипников (набор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9</text:p>
          </table:table-cell>
          <table:table-cell office:value-type="string" calcext:value-type="string">
            <text:p>770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8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.00.0000</text:date>, <text:time style:data-style-name="N2" text:time-value="18:37:04.7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15T18:38:35.282000000</dc:date>
    <meta:editing-duration>P10DT14H54M1S</meta:editing-duration>
    <meta:editing-cycles>4195</meta:editing-cycles>
    <meta:document-statistic meta:table-count="1" meta:cell-count="832" meta:object-count="0"/>
    <meta:user-defined meta:name="qrichtext">1</meta:user-defined>
  </office:meta>
</office:document-meta>
</file>