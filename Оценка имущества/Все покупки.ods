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3501.08=15154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63</text:p>
          </table:table-cell>
          <table:table-cell office:value-type="string" calcext:value-type="string">
            <text:p>?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501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office:value-type="string" calcext:value-type="string">
            <text:p>15154.08+763=15917.08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29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.00.0000</text:date>, <text:time style:data-style-name="N2" text:time-value="06:40:43.5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2T06:41:05.312000000</dc:date>
    <meta:editing-duration>P10DT12H26M19S</meta:editing-duration>
    <meta:editing-cycles>4177</meta:editing-cycles>
    <meta:document-statistic meta:table-count="1" meta:cell-count="795" meta:object-count="0"/>
    <meta:user-defined meta:name="qrichtext">1</meta:user-defined>
  </office:meta>
</office:document-meta>
</file>