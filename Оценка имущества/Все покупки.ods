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 table:number-columns-repeated="3"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table:style-name="Default"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 table:number-columns-repeated="3"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7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/>
          <table:table-cell office:value-type="string" calcext:value-type="string">
            <text:p>1193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style-name="Default" table:number-columns-repeated="1025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2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.00.0000</text:date>, <text:time style:data-style-name="N2" text:time-value="21:21:04.3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5-27T21:21:55.190000000</dc:date>
    <meta:editing-duration>P10DT8H56M14S</meta:editing-duration>
    <meta:editing-cycles>4138</meta:editing-cycles>
    <meta:document-statistic meta:table-count="1" meta:cell-count="750" meta:object-count="0"/>
    <meta:user-defined meta:name="qrichtext">1</meta:user-defined>
  </office:meta>
</office:document-meta>
</file>