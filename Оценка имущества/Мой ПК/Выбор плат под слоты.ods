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2cm"/>
    </style:style>
    <style:style style:name="co2" style:family="table-column">
      <style:table-column-properties fo:break-before="auto" style:column-width="7.749cm"/>
    </style:style>
    <style:style style:name="co3" style:family="table-column">
      <style:table-column-properties fo:break-before="auto" style:column-width="6.659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1.11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014cm"/>
    </style:style>
    <style:style style:name="co8" style:family="table-column">
      <style:table-column-properties fo:break-before="auto" style:column-width="0.718cm"/>
    </style:style>
    <style:style style:name="co9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100"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Выбор плат под слот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9" table:default-cell-style-name="Default"/>
        <table:table-column table:style-name="co10" table:number-columns-repeated="16373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ATX</text:p>
          </table:table-cell>
          <table:table-cell office:value-type="string" calcext:value-type="string">
            <text:p>для DDR4</text:p>
          </table:table-cell>
          <table:table-cell office:value-type="string" calcext:value-type="string">
            <text:p>для DDR5</text:p>
          </table:table-cell>
          <table:table-cell/>
          <table:table-cell office:value-type="string" calcext:value-type="string">
            <text:p>RAM</text:p>
          </table:table-cell>
          <table:table-cell office:value-type="string" calcext:value-type="string">
            <text:p>LPT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PCIe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цена ddr4</text:p>
          </table:table-cell>
          <table:table-cell table:style-name="ce1" office:value-type="string" calcext:value-type="string">
            <text:p>цена ddr5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3" office:value-type="string" calcext:value-type="string">
            <text:p>LGA1700 на H610 </text:p>
          </table:table-cell>
          <table:table-cell table:number-columns-repeated="8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MSI PRO H610M-C EX DDR4</text:p>
          </table:table-cell>
          <table:table-cell office:value-type="string" calcext:value-type="string">
            <text:p>MSI PRO H610M-C E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/>
          <table:table-cell office:value-type="string" calcext:value-type="string">
            <text:p>GIGABYTE H610M HD3P (rev. 1.0; 2.0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нет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Asus Pro H610M-C-CSM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ASUS Pro H610M-C D4-CSM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ASUS PRIME H610M-R D4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599 <text:a xlink:href="https://www.dns-shop.ru/product/02fb3788fe85ed20/materinskaa-plata-asus-prime-h610m-r-d4/characteristics/" xlink:type="simple">https://www.dns-shop.ru/product/02fb3788fe85ed20/materinskaa-plata-asus-prime-h610m-r-d4/characteristics/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ASUS PRIME H610M-R D4-SI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0965 <text:a xlink:href="https://megamarket.ru/catalog/details/materinskaya-plata-asus-90mb1b40-m0ecy0-600008773600/" xlink:type="simple">https://megamarket.ru/catalog/details/materinskaya-plata-asus-90mb1b40-m0ecy0-600008773600/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MSI PRO H610M VDHP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ASRock H610M-HDVP/D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ASRock B660M-HDVP/D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3" office:value-type="string" calcext:value-type="string">
            <text:p>LGA1700 с незапаяным LPT</text:p>
          </table:table-cell>
          <table:table-cell table:number-columns-repeated="8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GIGABYTE B660M DS3H AX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GIGABYTE B760M DS3H AX DDR4 (rev. 1.x)</text:p>
          </table:table-cell>
          <table:table-cell office:value-type="string" calcext:value-type="string">
            <text:p>GIGABYTE B760M DS3H AX (rev. 1.x)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4999 <text:a xlink:href="https://www.dns-shop.ru/product/252455806f1ced20/materinskaa-plata-gigabyte-b760m-ds3h-ax-ddr4/" xlink:type="simple">https://www.dns-shop.ru/product/252455806f1ced20/materinskaa-plata-gigabyte-b760m-ds3h-ax-ddr4/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GIGABYTE B660M DS3H DDR4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7" office:value-type="string" calcext:value-type="string">
            <text:p>mATX</text:p>
          </table:table-cell>
          <table:table-cell table:style-name="ce4" office:value-type="string" calcext:value-type="string">
            <text:p>GIGABYTE B760M DS3H DDR4</text:p>
          </table:table-cell>
          <table:table-cell office:value-type="string" calcext:value-type="string">
            <text:p>GIGABYTE B760M DS3H (rev. 1.0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1499 <text:a xlink:href="https://www.dns-shop.ru/product/252455826f1ced20/materinskaa-plata-gigabyte-b760m-ds3h-ddr4/" xlink:type="simple">https://www.dns-shop.ru/product/252455826f1ced20/materinskaa-plata-gigabyte-b760m-ds3h-ddr4/</text:a></text:p>
          </table:table-cell>
          <table:table-cell table:style-name="ce1" office:value-type="string" calcext:value-type="string">
            <text:p>12499 <text:a xlink:href="https://www.dns-shop.ru/product/11a212656f1ced20/materinskaa-plata-gigabyte-b760m-ds3h/" xlink:type="simple">https://www.dns-shop.ru/product/11a212656f1ced20/materinskaa-plata-gigabyte-b760m-ds3h/</text:a></text:p>
          </table:table-cell>
          <table:table-cell table:number-columns-repeated="16373"/>
        </table:table-row>
        <table:table-row table:style-name="ro1">
          <table:table-cell table:style-name="ce7"/>
          <table:table-cell table:style-name="ce4"/>
          <table:table-cell table:number-columns-repeated="7"/>
          <table:table-cell office:value-type="string" calcext:value-type="string">
            <text:p>12342 <text:a xlink:href="https://www.citilink.ru/product/materinskaya-plata-gigabyte-b760m-ds3h-ddr4-soc-1700-intel-b760-4xddr4-1884428/" xlink:type="simple">https://www.citilink.ru/product/materinskaya-plata-gigabyte-b760m-ds3h-ddr4-soc-1700-intel-b760-4xddr4-1884428/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7"/>
          <table:table-cell table:style-name="ce4"/>
          <table:table-cell table:number-columns-repeated="7"/>
          <table:table-cell office:value-type="string" calcext:value-type="string">
            <text:p>10965 <text:a xlink:href="https://megamarket.ru/catalog/details/materinskaya-plata-gigabyte-b760m-ds3h-ddr4-600010958518/" xlink:type="simple">https://megamarket.ru/catalog/details/materinskaya-plata-gigabyte-b760m-ds3h-ddr4-600010958518/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7" office:value-type="string" calcext:value-type="string">
            <text:p>mATX</text:p>
          </table:table-cell>
          <table:table-cell table:style-name="ce4" office:value-type="string" calcext:value-type="string">
            <text:p>MSI PRO B760M-P DDR4</text:p>
          </table:table-cell>
          <table:table-cell office:value-type="string" calcext:value-type="string">
            <text:p>MSI PRO B760M-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0399 <text:a xlink:href="https://www.dns-shop.ru/product/f56fc70e81d0ed20/materinskaa-plata-msi-pro-b760m-p-ddr4/" xlink:type="simple">https://www.dns-shop.ru/product/f56fc70e81d0ed20/materinskaa-plata-msi-pro-b760m-p-ddr4/</text:a></text:p>
          </table:table-cell>
          <table:table-cell table:style-name="ce1" office:value-type="string" calcext:value-type="string">
            <text:p>11999 <text:a xlink:href="https://www.dns-shop.ru/product/7155ab10d2caed20/materinskaa-plata-msi-pro-b760m-p/" xlink:type="simple">https://www.dns-shop.ru/product/7155ab10d2caed20/materinskaa-plata-msi-pro-b760m-p/</text:a>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11640 <text:a xlink:href="https://www.citilink.ru/product/materinskaya-plata-msi-pro-b760m-p-ddr4-soc-1700-intel-b760-4xddr4-mat-1907541/" xlink:type="simple">https://www.citilink.ru/product/materinskaya-plata-msi-pro-b760m-p-ddr4-soc-1700-intel-b760-4xddr4-mat-1907541/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GIGABYTE B660M D3H DDR4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GIGABYTE B760M D3H DDR4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5" office:value-type="string" calcext:value-type="string">
            <text:p>LGA1700 на B660 с *незапаяным нижним x16 </text:p>
          </table:table-cell>
          <table:table-cell table:number-columns-repeated="8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MSI PRO B660M-P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*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MSI PRO B660M-P WIFI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*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GIGABYTE Q670M D3H DDR4 (rev. 1.0)</text:p>
          </table:table-cell>
          <table:table-cell office:value-type="string" calcext:value-type="string">
            <text:p>GIGABYTE Q670M D3H (rev. 1.0)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table:style-name="ce1" office:value-type="string" calcext:value-type="string">
            <text:p>20499 <text:a xlink:href="https://www.dns-shop.ru/product/74b781826cc3ed20/materinskaa-plata-gigabyte-q670m-d3h/" xlink:type="simple">https://www.dns-shop.ru/product/74b781826cc3ed20/materinskaa-plata-gigabyte-q670m-d3h/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GIGABYTE Z690M DS3H DDR4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MSI PRO B660M-A CEC WIFI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MSI PRO B660M-A CEC WIFI DDR4 V2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MSI PRO B660M-VC WIFI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ATX</text:p>
          </table:table-cell>
          <table:table-cell office:value-type="string" calcext:value-type="string">
            <text:p>MSI PRO B660-A DDR4</text:p>
          </table:table-cell>
          <table:table-cell office:value-type="string" calcext:value-type="string">
            <text:p>MSI PRO B660-A 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2734 <text:a xlink:href="https://aliexpress.ru/item/1005004958497802.html" xlink:type="simple">https://aliexpress.ru/item/1005004958497802.html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ATX</text:p>
          </table:table-cell>
          <table:table-cell office:value-type="string" calcext:value-type="string">
            <text:p>MSI PRO B760-P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4999 <text:a xlink:href="https://www.dns-shop.ru/product/75d07a243bbfed20/materinskaa-plata-msi-pro-b760-p-ddr4/" xlink:type="simple">https://www.dns-shop.ru/product/75d07a243bbfed20/materinskaa-plata-msi-pro-b760-p-ddr4/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ATX</text:p>
          </table:table-cell>
          <table:table-cell/>
          <table:table-cell office:value-type="string" calcext:value-type="string">
            <text:p>MSI PRO B760-VC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ATX</text:p>
          </table:table-cell>
          <table:table-cell/>
          <table:table-cell office:value-type="string" calcext:value-type="string">
            <text:p>MSI PRO B760-VC WIFI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499 <text:a xlink:href="https://www.dns-shop.ru/product/7d1302d5e256ed20/materinskaa-plata-msi-pro-b760-vc-wifi/" xlink:type="simple">https://www.dns-shop.ru/product/7d1302d5e256ed20/materinskaa-plata-msi-pro-b760-vc-wifi/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ATX</text:p>
          </table:table-cell>
          <table:table-cell/>
          <table:table-cell office:value-type="string" calcext:value-type="string">
            <text:p>MSI PRO B760-VC WIFI II 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table:style-name="ce1" office:value-type="string" calcext:value-type="string">
            <text:p>нет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ATX</text:p>
          </table:table-cell>
          <table:table-cell office:value-type="string" calcext:value-type="string">
            <text:p>MSI PRO B760-P WIFI DDR4</text:p>
          </table:table-cell>
          <table:table-cell office:value-type="string" calcext:value-type="string">
            <text:p>MSI PRO B760-P WIFI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499 <text:a xlink:href="https://www.dns-shop.ru/product/eeec7d7481d0ed20/materinskaa-plata-msi-pro-b760-p-wifi-ddr4/" xlink:type="simple">https://www.dns-shop.ru/product/eeec7d7481d0ed20/materinskaa-plata-msi-pro-b760-p-wifi-ddr4/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ATX</text:p>
          </table:table-cell>
          <table:table-cell/>
          <table:table-cell office:value-type="string" calcext:value-type="string">
            <text:p>MSI B760 GAMING PLUS WIFI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table:style-name="ce1" office:value-type="string" calcext:value-type="string">
            <text:p>16999 <text:a xlink:href="https://www.dns-shop.ru/product/b53ec787e255ed20/materinskaa-plata-msi-b760-gaming-plus-wifi/" xlink:type="simple">https://www.dns-shop.ru/product/b53ec787e255ed20/materinskaa-plata-msi-b760-gaming-plus-wifi/</text:a></text:p>
          </table:table-cell>
          <table:table-cell table:number-columns-repeated="16373"/>
        </table:table-row>
        <table:table-row table:style-name="ro1" table:number-rows-repeated="6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3" office:value-type="string" calcext:value-type="string">
            <text:p>LGA1200</text:p>
          </table:table-cell>
          <table:table-cell table:number-columns-repeated="8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3"/>
          <table:table-cell table:number-columns-repeated="8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ATX</text:p>
          </table:table-cell>
          <table:table-cell office:value-type="string" calcext:value-type="string">
            <text:p>GIGABYTE H470 HD3</text:p>
          </table:table-cell>
          <table:table-cell table:number-columns-repeated="2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ATX</text:p>
          </table:table-cell>
          <table:table-cell office:value-type="string" calcext:value-type="string">
            <text:p>GIGABYTE B460 HD3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ATX</text:p>
          </table:table-cell>
          <table:table-cell office:value-type="string" calcext:value-type="string">
            <text:p>GIGABYTE B560 HD3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B460M DS3H V2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B560M DS3H V3 (rev. 1.0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B560M DS3H AC (rev. 1.x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B560M DS3H V2 (rev. 1.x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B560M DS3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349 <text:a xlink:href="https://www.avito.ru/moskva/tovary_dlya_kompyutera/materinskaya_plata_gigabyte_b560m_ds3h_v3_3741244732" xlink:type="simple">https://www.avito.ru/moskva/tovary_dlya_kompyutera/materinskaya_plata_gigabyte_b560m_ds3h_v3_3741244732</text:a>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H410M HD3P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H510M HD3P (rev. 1.0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H510M S2P (rev. 1.0/1.2)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H470M DS3H (rev. 1.0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GA-B560M-D3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967 <text:a xlink:href="https://aliexpress.ru/item/1005006489809181.html" xlink:type="simple">https://aliexpress.ru/item/1005006489809181.html</text:a></text:p>
          </table:table-cell>
          <table:table-cell table:style-name="ce1" table:number-columns-repeated="16374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B560M DS3H PLUS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B460M D3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B560M D3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2768 <text:a xlink:href="https://www.ozon.ru/product/materinskaya-plata-gigabyte-b560m-d3h-b560m-d3h-1420880478" xlink:type="simple">https://www.ozon.ru/product/materinskaya-plata-gigabyte-b560m-d3h-b560m-d3h-1420880478</text:a></text:p>
          </table:table-cell>
          <table:table-cell table:style-name="ce1" office:value-type="string" calcext:value-type="string">
            <text:p>7526  <text:a xlink:href="https://www.avito.ru/novosibirsk/tovary_dlya_kompyutera/gigabyte_b560m-d3h_3826729709" xlink:type="simple">https://www.avito.ru/novosibirsk/tovary_dlya_kompyutera/gigabyte_b560m-d3h_3826729709</text:a>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mATX</text:p>
          </table:table-cell>
          <table:table-cell office:value-type="string" calcext:value-type="string">
            <text:p>GIGABYTE Q570M D3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4146 <text:a xlink:href="https://www.ozon.ru/product/gigabyte-materinskaya-plata-q570m-d3h-ddr4-917894239" xlink:type="simple">https://www.ozon.ru/product/gigabyte-materinskaya-plata-q570m-d3h-ddr4-917894239</text:a></text:p>
          </table:table-cell>
          <table:table-cell table:style-name="ce1"/>
          <table:table-cell table:number-columns-repeated="16373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16374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.00.0000</text:date>, <text:time style:data-style-name="N2" text:time-value="22:40:35.3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07:16:26.120000000</meta:creation-date>
    <meta:generator>LibreOffice/7.6.4.1$Windows_x86 LibreOffice_project/e19e193f88cd6c0525a17fb7a176ed8e6a3e2aa1</meta:generator>
    <dc:date>2024-03-26T22:42:23.620000000</dc:date>
    <meta:editing-duration>PT11H1M59S</meta:editing-duration>
    <meta:editing-cycles>81</meta:editing-cycles>
    <meta:print-date>2024-02-16T15:47:14.546000000</meta:print-date>
    <meta:document-statistic meta:table-count="1" meta:cell-count="278" meta:object-count="0"/>
  </office:meta>
</office:document-meta>
</file>